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F6000001C3B5C77F0B98A24532.jpg" manifest:media-type="image/jpeg"/>
  <manifest:file-entry manifest:full-path="Pictures/10000000000001D80000021304B663CB8EB0773C.png" manifest:media-type="image/png"/>
  <manifest:file-entry manifest:full-path="Pictures/100000000000015E00000140A8790400CF2EB887.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5in"/>
        </style:tab-stops>
      </style:paragraph-properties>
    </style:style>
    <style:style style:name="P2" style:family="paragraph" style:parent-style-name="Standard">
      <style:paragraph-properties>
        <style:tab-stops>
          <style:tab-stop style:position="0.5in"/>
          <style:tab-stop style:position="1.8583in"/>
        </style:tab-stops>
      </style:paragraph-properties>
    </style:style>
    <style:style style:name="P3" style:family="paragraph" style:parent-style-name="Standard">
      <style:paragraph-properties>
        <style:tab-stops>
          <style:tab-stop style:position="0.5in"/>
          <style:tab-stop style:position="6.4972in" style:type="right"/>
        </style:tab-stops>
      </style:paragraph-properties>
    </style:style>
    <style:style style:name="P4"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2756in" style:auto-text-indent="false" fo:break-before="auto" fo:break-after="auto" fo:padding="0in" fo:border="none" fo:keep-with-next="auto">
        <style:tab-stops>
          <style:tab-stop style:position="0.5in"/>
        </style:tab-stops>
      </style:paragraph-properties>
    </style:style>
    <style:style style:name="P5" style:family="paragraph" style:parent-style-name="Standard" style:master-page-name="Standard">
      <style:paragraph-properties fo:margin-left="0in" fo:margin-right="0in" fo:margin-top="0.1665in" fo:margin-bottom="0in" loext:contextual-spacing="false" fo:line-height="100%" fo:text-align="center" style:justify-single-word="false" fo:keep-together="auto" fo:orphans="2" fo:widows="2" fo:text-indent="0.2756in" style:auto-text-indent="false" style:page-number="101" fo:break-before="auto" fo:break-after="auto" fo:padding="0in" fo:border="none" fo:keep-with-next="auto">
        <style:tab-stops>
          <style:tab-stop style:position="0.5in"/>
        </style:tab-stops>
      </style:paragraph-properties>
    </style:style>
    <style:style style:name="P6"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7"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ab-stops>
          <style:tab-stop style:position="0.5in"/>
        </style:tab-stops>
      </style:paragraph-properties>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P9"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0"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1" style:family="paragraph" style:parent-style-name="Standard">
      <style:paragraph-properties fo:margin-top="0.1665in" fo:margin-bottom="0in" loext:contextual-spacing="false" fo:line-height="100%" fo:text-align="center" style:justify-single-word="false">
        <style:tab-stops>
          <style:tab-stop style:position="0.5in"/>
        </style:tab-stops>
      </style:paragraph-properties>
    </style:style>
    <style:style style:name="P12" style:family="paragraph" style:parent-style-name="Standard">
      <style:paragraph-properties fo:margin-top="0in" fo:margin-bottom="0in" loext:contextual-spacing="false" fo:line-height="100%" fo:text-align="start" style:justify-single-word="false">
        <style:tab-stops>
          <style:tab-stop style:position="0.5in"/>
          <style:tab-stop style:position="6.4972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style:tab-stops>
          <style:tab-stop style:position="0.5in"/>
          <style:tab-stop style:position="6.4972in" style:type="right"/>
        </style:tab-stops>
      </style:paragraph-properties>
    </style:style>
    <style:style style:name="P14" style:family="paragraph" style:parent-style-name="Standard">
      <style:paragraph-properties fo:margin-top="0in" fo:margin-bottom="0in" loext:contextual-spacing="false" fo:line-height="100%" fo:text-align="start" style:justify-single-word="false">
        <style:tab-stops>
          <style:tab-stop style:position="0.5in"/>
          <style:tab-stop style:position="6.4972in" style:type="right"/>
        </style:tab-stops>
      </style:paragraph-properties>
      <style:text-properties fo:font-size="8pt" style:font-size-asian="8pt" style:font-size-complex="8pt"/>
    </style:style>
    <style:style style:name="P15" style:family="paragraph" style:parent-style-name="Standard">
      <style:paragraph-properties fo:margin-left="0.3154in" fo:margin-right="0.3154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6" style:family="paragraph" style:parent-style-name="Standard">
      <style:paragraph-properties fo:margin-left="0.3154in" fo:margin-right="0.3154in" fo:margin-top="0in" fo:margin-bottom="0.083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7" style:family="paragraph" style:parent-style-name="Standard">
      <style:paragraph-properties fo:margin-left="0.3154in" fo:margin-right="0.3154in" fo:margin-top="0.0835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8"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5in"/>
        </style:tab-stops>
      </style:paragraph-properties>
    </style:style>
    <style:style style:name="P19" style:family="paragraph" style:parent-style-name="Standard">
      <style:paragraph-properties fo:margin-left="0.1972in" fo:margin-right="0in" fo:margin-top="0.0835in" fo:margin-bottom="0in" loext:contextual-spacing="false" fo:line-height="100%" fo:text-align="justify" style:justify-single-word="false" fo:keep-together="auto" fo:orphans="2" fo:widows="2" fo:text-indent="-0.1972in" style:auto-text-indent="false" fo:break-before="auto" fo:break-after="auto" fo:padding="0in" fo:border="none" fo:keep-with-next="auto">
        <style:tab-stops>
          <style:tab-stop style:position="0.5in"/>
        </style:tab-stops>
      </style:paragraph-properties>
    </style:style>
    <style:style style:name="T1"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font-style-complex="italic" style:font-weight-complex="bold"/>
    </style:style>
    <style:style style:name="T3" style:family="text">
      <style:text-properties fo:font-variant="normal" fo:text-transform="none" fo:color="#0000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font-style-complex="italic" style:font-weight-complex="normal"/>
    </style:style>
    <style:style style:name="T4"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fo:font-size="11pt" fo:font-style="italic" style:text-underline-style="none" fo:font-weight="bold" style:font-name-asian="Times1" style:font-size-asian="11pt" style:font-style-asian="italic" style:font-weight-asian="bold" style:font-name-complex="Times1" style:font-size-complex="11pt" style:font-style-complex="italic" style:font-weight-complex="bold"/>
    </style:style>
    <style:style style:name="T7" style:family="text">
      <style:text-properties fo:font-variant="normal" fo:text-transform="none" fo:color="#000000" style:text-line-through-style="none" style:text-line-through-type="none" style:text-position="0% 100%" style:font-name="Times" fo:font-size="11pt" fo:font-style="italic" style:text-underline-style="none" fo:font-weight="normal" style:font-name-asian="Times1" style:font-size-asian="11pt" style:font-style-asian="italic" style:font-weight-asian="normal" style:font-name-complex="Times1" style:font-size-complex="11pt" style:font-style-complex="italic" style:font-weight-complex="normal"/>
    </style:style>
    <style:style style:name="T8" style:family="text">
      <style:text-properties fo:font-variant="normal" fo:text-transform="none" fo:color="#000000" style:text-line-through-style="none" style:text-line-through-type="none" style:text-position="0% 100%" style:font-name="Times" fo:font-size="13pt" fo:font-style="normal" style:text-underline-style="none" fo:font-weight="bold" style:font-name-asian="Times1" style:font-size-asian="13pt" style:font-style-asian="normal" style:font-weight-asian="bold" style:font-name-complex="Times1" style:font-size-complex="13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fo:font-size="12pt" fo:font-style="italic" style:font-size-asian="12pt" style:font-style-asian="italic" style:font-size-complex="12pt" style:font-style-complex="italic"/>
    </style:style>
    <style:style style:name="T11" style:family="text">
      <style:text-properties fo:font-variant="normal" fo:text-transform="none" fo:color="#0000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font-style-complex="normal" style:font-weight-complex="bold"/>
    </style:style>
    <style:style style:name="T12" style:family="text">
      <style:text-properties fo:font-variant="normal" fo:text-transform="none" fo:color="#000000" style:text-line-through-style="none" style:text-line-through-type="none" style:text-position="super 58%" style:font-name="Times" fo:font-size="12pt" fo:font-style="normal" style:text-underline-style="none" fo:font-weight="bold" style:font-name-asian="Times1" style:font-size-asian="12pt" style:font-style-asian="normal" style:font-weight-asian="bold" style:font-name-complex="Times1"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super 58%" style:font-name="Times" fo:font-size="12pt" fo:font-style="normal" style:text-underline-style="none" fo:font-weight="normal" style:font-name-asian="Times1" style:font-size-asian="12pt" style:font-style-asian="normal" style:font-weight-asian="normal" style:font-name-complex="Times1" style:font-size-complex="12pt" style:font-style-complex="normal" style:font-weight-complex="normal"/>
    </style:style>
    <style:style style:name="T14" style:family="text">
      <style:text-properties style:text-position="super 58%" style:font-name="Times" fo:font-size="12pt" style:font-name-asian="Times1" style:font-size-asian="12pt" style:font-name-complex="Times1" style:font-size-complex="12pt"/>
    </style:style>
    <style:style style:name="T15" style:family="text">
      <style:text-properties style:font-name="Times" fo:font-size="12pt" style:font-name-asian="Times1" style:font-size-asian="12pt" style:font-name-complex="Times1" style:font-size-complex="12pt"/>
    </style:style>
    <style:style style:name="T16" style:family="text">
      <style:text-properties fo:font-size="8pt" style:font-size-asian="8pt" style:font-size-complex="8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063in, 0.089in, 0.0535in, 0.141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ítulo em Português</text:span></text:p>
      <text:p text:style-name="P4"><text:span text:style-name="T2">Title: Título em Inglês</text:span></text:p>
      <text:p text:style-name="P6"><text:span text:style-name="T4">Luciana P. Nedel</text:span><text:span text:style-name="T12">1</text:span><text:span text:style-name="T4">, Rafael H. Bordini</text:span><text:span text:style-name="T12">2</text:span><text:span text:style-name="T4">, Flávio Rech Wagner</text:span><text:span text:style-name="T12">1</text:span><text:span text:style-name="T4">, Jomi F. Hübner</text:span><text:span text:style-name="T12">3</text:span></text:p>
      <text:p text:style-name="P11"><text:span text:style-name="T14">1</text:span><text:span text:style-name="T15">Instituto de Informática – Universidade Federal do Rio Grande do Sul (UFRGS)<text:line-break/>Caixa Postal 15.064 – 91.501-970 – Porto Alegre – RS – Brazil</text:span></text:p>
      <text:p text:style-name="P6"><text:span text:style-name="T13">2</text:span><text:span text:style-name="T5">Department of Computer Science – University of Durham<text:line-break/>Durham, U.K.</text:span></text:p>
      <text:p text:style-name="P6"><text:span text:style-name="T13">3</text:span><text:span text:style-name="T5">Departamento de Sistemas e Computação<text:line-break/>Universidade Regional de Blumenau (FURB) – Blumenau, SC – Brazil</text:span></text:p>
      <text:p text:style-name="P9"><text:span text:style-name="T9">{nedel,flavio}@inf.ufrgs.br, R.Bordini@durham.ac.uk, jomi@inf.furb.br</text:span></text:p>
      <text:section text:style-name="Sect1" text:name="TextSection">
        <text:p text:style-name="P15"><text:span text:style-name="T2">Abstract. </text:span><text:span text:style-name="T10">You must follow the </text:span><text:span text:style-name="T17">fields of the structured abstract, also kepping the subtitles in bold. </text:span><text:span text:style-name="T18">Introduction</text:span><text:span text:style-name="T17">: A good abstract, in addition to succinctly informing the content of a scientific article, serves to attract attention to the work. However, in recent years, many articles submitted to SBGames do not present any type of standardization of abstracts, which also hinders the review process. </text:span><text:span text:style-name="T18">Objective</text:span><text:span text:style-name="T17">: Therefore, this year we will adopt a MANDATORY STRUCTURED ABSTRACT as a way to organize the work. </text:span><text:span text:style-name="T18">Methodology or Steps</text:span><text:span text:style-name="T17">: The organization of this structured abstract follows an adaptation of ABNT 6028:2021, which deals with standards for the presentation of abstracts. </text:span><text:span text:style-name="T18">Results</text:span><text:span text:style-name="T17">: Thus, it is expected that there will be an improvement in the presentation of abstracts and, consequently, in the quality of the articles. ATTENTION: In short papers, it should be changed to "Expected Results", since they mostly present research intentions and/or partial results.</text:span></text:p>
        <text:p text:style-name="P16"><text:span text:style-name="T6">Keywords:</text:span><text:span text:style-name="T7"> Word 1, Word 2, Word 3, Word 4, Word 5.</text:span></text:p>
        <text:p text:style-name="P15"><text:span text:style-name="T2">Resumo.</text:span><text:span text:style-name="T3"> </text:span><text:span text:style-name="T17">O resumo estruturado a seguir é obrigatório nos artigos, incluindo os campos em negrito devem pemanecer. </text:span><text:span text:style-name="T18">Introdução</text:span><text:span text:style-name="T17">: Um bom resumo, além de informar sucintamente o conteúdo de um artigo científico, serve para atrair a atenção para o trabalho. Contudo, nos últimos anos, muitos artigos submetidos ao SBGames, não apresentam nenhum tipo de padronização dos resumos, o que, também dificulta o processo de revisão. </text:span><text:span text:style-name="T18">Objetivo</text:span><text:span text:style-name="T17">: Portanto, neste ano adotaremos o RESUMO ESTRUTURADO OBRIGATÓRIO, como forma de organizar os trabalho. </text:span><text:span text:style-name="T18">Metodologia ou Etapas</text:span><text:span text:style-name="T17">: A organização deste resumo estruturado segue uma adaptação da ABNT 6028:2021, que versa sobre normas para apresentação de resumos. </text:span><text:span text:style-name="T18">Resultados</text:span><text:span text:style-name="T17">: Assim espera-se que haja uma melhora na apresentação dos resumos e, consequentemente, na qualidade dos artigos. ATENÇÃO: Em trabalhos curtos, deve-se trocar para “Resultados Esperados”, uma vez que eles apresentam na maioria das vezes, intenções de pesquisa e/ou resultados parciais.</text:span></text:p>
        <text:p text:style-name="P16"><text:span text:style-name="T6">Palavras-chave:</text:span><text:span text:style-name="T7"> Palavra 1, Palavra 2, Palavra 3, Palavra 4, Palavra 5.</text:span></text:p>
        <text:p text:style-name="P7"><text:span text:style-name="T8">1. General Information</text:span></text:p>
        <text:p text:style-name="P1">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P1"><text:tab/>Full papers must respect the page limits defined by the conference. Conferences that publish just abstracts ask for <text:span text:style-name="T19">one</text:span>-page texts.</text:p>
        <text:p text:style-name="P7"><text:span text:style-name="T8">2. First Page</text:span></text:p>
        <text:p text:style-name="P1">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tab/>The abstract and “resumo” (if is the case) must be in 12 point Times font, indented 0.8cm on both sides. The word <text:span text:style-name="T19">Abstract </text:span>and <text:span text:style-name="T19">Resumo</text:span>, should be written in boldface and must precede the text.</text:p>
        <text:p text:style-name="P7"><text:span text:style-name="T8">3. CD-ROMs and Printed Proceedings</text:span></text:p>
        <text:p text:style-name="P1">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p text:style-name="P7"><text:span text:style-name="T8">4. Sections and Paragraphs</text:span></text:p>
        <text:p text:style-name="P1">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p text:style-name="P7"><text:span text:style-name="T4">4.1. Subsections</text:span></text:p>
        <text:p text:style-name="P1">The subsection titles must be in boldface, 12pt, flush left.</text:p>
        <text:p text:style-name="P7"><text:span text:style-name="T8">5. Figures and Captions</text:span></text:p>
        <text:p text:style-name="P1">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10"><draw:frame draw:style-name="fr1" draw:name="image3.png" text:anchor-type="as-char" svg:width="3.4055in" svg:height="3.1035in" draw:z-index="0"><draw:image xlink:href="Pictures/100000000000015E00000140A8790400CF2EB887.png" xlink:type="simple" xlink:show="embed" xlink:actuate="onLoad" loext:mime-type="image/png"/></draw:frame></text:p>
        <text:p text:style-name="P17"><text:span text:style-name="T11">Figura 1. A typical figure</text:span></text:p>
        <text:p text:style-name="P10"><draw:frame draw:style-name="fr1" draw:name="image2.png" text:anchor-type="as-char" svg:width="2.7264in" svg:height="3.0571in" draw:z-index="0"><draw:image xlink:href="Pictures/10000000000001D80000021304B663CB8EB0773C.png" xlink:type="simple" xlink:show="embed" xlink:actuate="onLoad" loext:mime-type="image/png"/></draw:frame></text:p>
        <text:p text:style-name="P18"><text:span text:style-name="T11">Figura 2. This figure is an example of a figure caption taking more than one line and justified considering margins mentioned in Section 5.</text:span></text:p>
        <text:p text:style-name="P1"><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17"><text:span text:style-name="T11">Tabela 1. Variables to be considered on the evaluation of interaction techniques</text:span></text:p>
        <text:p text:style-name="P10"><draw:frame draw:style-name="fr2" draw:name="image1.jpg" text:anchor-type="as-char" svg:width="4.2925in" svg:height="2.5472in" draw:z-index="0"><draw:image xlink:href="Pictures/10000000000002F6000001C3B5C77F0B98A24532.jpg" xlink:type="simple" xlink:show="embed" xlink:actuate="onLoad" loext:mime-type="image/jpeg"/></draw:frame></text:p>
        <text:p text:style-name="P7"><text:span text:style-name="T8">6. Images</text:span></text:p>
        <text:p text:style-name="P1">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p text:style-name="P7"><text:span text:style-name="T8">7. References</text:span></text:p>
        <text:p text:style-name="P1">Bibliographic references must be unambiguous and uniform. <text:s/>We recommend giving the author names references in brackets, e.g. [Knuth 1984], [Boulic and Renault 1991]; or dates in parentheses, e.g. Knuth (1984), Smith and Jones (1999).</text:p>
        <text:p text:style-name="P1"><text:tab/>The references must be listed using 12 point font size, with 6 points of space before each reference. The first line of each reference should not be indented, while the subsequent should be indented by 0.5 cm.</text:p>
        <text:p text:style-name="P7"><text:span text:style-name="T8">References</text:span></text:p>
        <text:p text:style-name="P19"><text:span text:style-name="T5">Boulic, R. and Renault, O. (1991) “3D Hierarchies for Animation”, In: New Trends in Animation and Visualization, Edited by Nadia Magnenat-Thalmann and Daniel Thalmann, John Wiley &amp; Sons ltd., England.</text:span></text:p>
        <text:p text:style-name="P19"><text:span text:style-name="T5">Dyer, S., Martin, J. and Zulauf, J. (1995) “Motion Capture White Paper”, </text:span><text:a xlink:type="simple" xlink:href="http://reality.sgi.com/employees/jam_sb/mocap/MoCapWP_v2.0.html" text:style-name="ListLabel_20_1" text:visited-style-name="ListLabel_20_1"><text:span text:style-name="T5">http://reality.sgi.com/employees/jam_sb/mocap/MoCapWP_v2.0.html</text:span></text:a><text:span text:style-name="T5">, December.</text:span></text:p>
        <text:p text:style-name="P19"><text:span text:style-name="T5">Holton, M. and Alexander, S. (1995) “Soft Cellular Modeling: A Technique for the Simulation of Non-rigid Materials”, Computer Graphics: Developments in Virtual Environments, R. A. Earnshaw and J. A. Vince, England, Academic Press Ltd., p. 449-460.</text:span></text:p>
        <text:p text:style-name="P19"><text:span text:style-name="T5">Knuth, D. E. (1984), The TeXbook, Addison Wesley, 15</text:span><text:span text:style-name="T13">th</text:span><text:span text:style-name="T5"> edition. </text:span></text:p>
        <text:p text:style-name="P19"><text:span text:style-name="T5">Smith, A. and Jones, B. (1999). On the complexity of computing. In </text:span><text:span text:style-name="T3">Advances in Computer Science</text:span><text:span text:style-name="T5">, pages 555–566. Publishing Pres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none"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none"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fo:text-align="justify" style:justify-single-word="false">
        <style:tab-stops>
          <style:tab-stop style:position="0.5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text-align="start" style:justify-single-word="false" fo:keep-with-next="always"/>
      <style:text-properties fo:font-size="13pt" fo:font-weight="bold" style:font-size-asian="13pt" style:font-weight-asian="bold" style:font-size-complex="13pt" style:font-weight-complex="bold"/>
    </style:style>
    <style:style style:name="Heading_20_2" style:display-name="Heading 2" style:family="paragraph" style:parent-style-name="normal" style:next-style-name="Standard" style:default-outline-level="" style:class="text">
      <style:paragraph-properties fo:margin-top="0.1665in" fo:margin-bottom="0in" loext:contextual-spacing="false" fo:line-height="100%" fo:text-align="start" style:justify-single-word="false" fo:keep-with-next="always"/>
      <style:text-properties fo:font-weight="bold" style:font-weight-asian="bold" style:font-weight-complex="bold"/>
    </style:style>
    <style:style style:name="Heading_20_3" style:display-name="Heading 3" style:family="paragraph" style:parent-style-name="normal" style:next-style-name="Standard" style:default-outline-level="" style:class="text">
      <style:paragraph-properties fo:margin-top="0.1665in" fo:margin-bottom="0in" loext:contextual-spacing="false" fo:line-height="100%" fo:keep-with-next="always"/>
      <style:text-properties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1665in" fo:margin-bottom="0in" loext:contextual-spacing="false" fo:line-height="100%"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5" style:display-name="Heading 5" style:family="paragraph" style:parent-style-name="normal" style:next-style-name="Standard" style:default-outline-level="" style:class="text">
      <style:paragraph-properties fo:margin-top="0.1665in" fo:margin-bottom="0in" loext:contextual-spacing="false" fo:line-height="100%"/>
      <style:text-properties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itle" style:family="paragraph" style:parent-style-name="normal" style:next-style-name="Standard" style:default-outline-level="" style:class="chapter">
      <style:paragraph-properties fo:margin-left="0in" fo:margin-right="0in" fo:margin-top="0.1665in" fo:margin-bottom="0in" loext:contextual-spacing="false" fo:line-height="100%" fo:text-align="center" style:justify-single-word="false" fo:text-indent="0.2756in" style:auto-text-indent="false"/>
      <style:text-properties fo:font-size="16pt" fo:font-weight="bold" style:font-size-asian="16pt" style:font-weight-asian="bold" style:font-size-complex="1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normal" style:font-name-asian="Times1" style:font-family-asian="Times" style:font-family-generic-asian="system" style:font-pitch-asian="variable" style:font-size-asian="12pt" style:font-style-asian="normal" style:font-weight-asian="normal" style:font-name-complex="Times1" style:font-family-complex="Times" style:font-family-generic-complex="system" style:font-pitch-complex="variable"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1785in" fo:margin-left="0in" fo:margin-top="0in" fo:margin-bottom="0in" table:align="left"/>
    </style:style>
    <style:style style:name="Table1.A" style:family="table-column">
      <style:table-column-properties style:column-width="4.5042in"/>
    </style:style>
    <style:style style:name="Table1.B" style:family="table-column">
      <style:table-column-properties style:column-width="1.673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2" style:family="table">
      <style:table-properties style:width="6.1785in" fo:margin-left="0in" fo:margin-top="0in" fo:margin-bottom="0in" table:align="left"/>
    </style:style>
    <style:style style:name="Table2.A" style:family="table-column">
      <style:table-column-properties style:column-width="4.5042in"/>
    </style:style>
    <style:style style:name="Table2.B" style:family="table-column">
      <style:table-column-properties style:column-width="1.673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style:tab-stops>
          <style:tab-stop style:position="0.5in"/>
        </style:tab-stops>
      </style:paragraph-properties>
    </style:style>
    <style:style style:name="MP2" style:family="paragraph" style:parent-style-name="Standard">
      <style:paragraph-properties fo:margin-top="0in" fo:margin-bottom="0in" loext:contextual-spacing="false" fo:line-height="100%" fo:text-align="start" style:justify-single-word="false">
        <style:tab-stops>
          <style:tab-stop style:position="0.5in"/>
          <style:tab-stop style:position="6.4972in" style:type="right"/>
        </style:tab-stops>
      </style:paragraph-properties>
    </style:style>
    <style:style style:name="MP3" style:family="paragraph" style:parent-style-name="Standard">
      <style:paragraph-properties fo:margin-top="0in" fo:margin-bottom="0in" loext:contextual-spacing="false" fo:line-height="100%" fo:text-align="end" style:justify-single-word="false">
        <style:tab-stops>
          <style:tab-stop style:position="0.5in"/>
          <style:tab-stop style:position="6.4972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style:tab-stops>
          <style:tab-stop style:position="0.5in"/>
          <style:tab-stop style:position="6.4972in" style:type="right"/>
        </style:tab-stops>
      </style:paragraph-properties>
      <style:text-properties fo:font-size="8pt" style:font-size-asian="8pt" style:font-size-complex="8pt"/>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MP6" style:family="paragraph" style:parent-style-name="Standard">
      <style:paragraph-properties>
        <style:tab-stops>
          <style:tab-stop style:position="0.5in"/>
          <style:tab-stop style:position="1.8583in"/>
        </style:tab-stops>
      </style:paragraph-properties>
    </style:style>
    <style:style style:name="MP7" style:family="paragraph" style:parent-style-name="Standard">
      <style:paragraph-properties>
        <style:tab-stops>
          <style:tab-stop style:position="0.5in"/>
          <style:tab-stop style:position="6.4972in" style:type="right"/>
        </style:tab-stops>
      </style:paragraph-properties>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6693in" fo:margin-bottom="0.9846in" fo:margin-left="1.1811in" fo:margin-right="1.1811in" style:writing-mode="lr-tb" style:layout-grid-color="#c0c0c0" style:layout-grid-lines="23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69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6693in" fo:margin-bottom="0.9846in" fo:margin-left="1.1811in" fo:margin-right="1.181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page-layout>
    <style:page-layout style:name="Mpm4">
      <style:page-layout-properties fo:page-width="8.2681in" fo:page-height="11.6929in" style:num-format="1" style:print-orientation="portrait" fo:margin-top="0.9693in" fo:margin-bottom="0.6693in" fo:margin-left="1.1811in" fo:margin-right="1.181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54in" fo:margin-left="0in" fo:margin-right="0in" fo:margin-top="0.2756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XXV Simpósio Brasileiro de Jogos e Entretenimento Digital (SBGames 2026) – Goiânia/GO</text:span></text:p>
            </table:table-cell>
            <table:table-cell table:style-name="Table1.A1" table:number-rows-spanned="2" office:value-type="string">
              <text:p text:style-name="MP3"><text:span text:style-name="MT1">Trilha: [Informe o título da trilha]</text:span></text:p>
            </table:table-cell>
          </table:table-row>
          <table:table-row table:style-name="Table1.1">
            <table:table-cell table:style-name="Table1.A2" office:value-type="string">
              <text:p text:style-name="MP4"/>
            </table:table-cell>
            <table:covered-table-cell/>
          </table:table-row>
        </table:table>
        <text:p text:style-name="MP6"><text:tab/></text:p>
      </style:header>
    </style:master-page>
    <style:master-page style:name="First_20_Page" style:display-name="First Page" style:page-layout-name="Mpm2" style:next-style-name="Standard">
      <style:footer>
        <text:p text:style-name="MP1">Proceedings of the XII SIBGRAPI (October 1999) 101-104</text:p>
      </style:footer>
    </style:master-page>
    <style:master-page style:name="Converted1" style:page-layout-name="Mpm3">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text:span text:style-name="MT1">XXV Simpósio Brasileiro de Jogos e Entretenimento Digital (SBGames 2026) – Goiânia/GO</text:span></text:p>
            </table:table-cell>
            <table:table-cell table:style-name="Table2.A1" table:number-rows-spanned="2" office:value-type="string">
              <text:p text:style-name="MP3"><text:span text:style-name="MT1">Trilha: [Informe o título da trilha]</text:span></text:p>
            </table:table-cell>
          </table:table-row>
          <table:table-row table:style-name="Table2.1">
            <table:table-cell table:style-name="Table2.A1" office:value-type="string">
              <text:p text:style-name="MP4"/>
            </table:table-cell>
            <table:covered-table-cell/>
          </table:table-row>
        </table:table>
        <text:p text:style-name="MP7"/>
      </style:header>
    </style:master-page>
    <style:master-page style:name="Converted2" style:page-layout-name="Mpm4" style:next-style-name="Converted1">
      <style:footer>
        <text:p text:style-name="MP1">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50" meta:word-count="1227" meta:character-count="7829" meta:non-whitespace-character-count="6626"/>
    <meta:generator>LibreOfficeDev/6.0.5.2$Linux_X86_64 LibreOffice_project/</meta:generator>
  </office:meta>
</office:document-meta>
</file>